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4" style:family="paragraph" style:parent-style-name="Standard" style:list-style-name="L1">
      <style:paragraph-properties fo:text-align="left" style:justify-single-word="false"/>
      <style:text-properties style:text-line-through-style="solid" style:text-line-through-type="single" fo:font-size="14pt" fo:font-weight="normal" officeooo:rsid="0014fcae" officeooo:paragraph-rsid="0014fcae" style:font-size-asian="12.25pt" style:font-weight-asian="normal" style:font-size-complex="14pt" style:font-weight-complex="normal"/>
    </style:style>
    <style:style style:name="P5"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6"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7" style:family="paragraph" style:parent-style-name="Standard" style:list-style-name="L2">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9"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0"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1"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75b4a" officeooo:paragraph-rsid="00175b4a"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style:text-line-through-style="none" style:text-line-through-type="none" fo:font-size="14pt" style:text-underline-style="none" fo:font-weight="bold" officeooo:rsid="001aad3e" officeooo:paragraph-rsid="001aad3e" style:font-size-asian="12.25pt" style:font-weight-asian="bold" style:font-size-complex="14pt" style:font-weight-complex="bold"/>
    </style:style>
    <style:style style:name="P13"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aad3e" officeooo:paragraph-rsid="001aad3e" style:font-size-asian="12.25pt" style:font-weight-asian="normal" style:font-size-complex="14pt" style:font-weight-complex="normal"/>
    </style:style>
    <style:style style:name="P14"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15"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6"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7"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18"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T1" style:family="text">
      <style:text-properties officeooo:rsid="001aad3e"/>
    </style:style>
    <style:style style:name="T2" style:family="text">
      <style:text-properties officeooo:rsid="001a08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2"/>
      <text:p text:style-name="P2">Ruta token.</text:p>
      <text:list text:style-name="L1">
        <text:list-item>
          <text:p text:style-name="P3">Cualquier combinación de email y password otorga token.</text:p>
        </text:list-item>
        <text:list-item>
          <text:p text:style-name="P3">Debe devolver el nombre del usuario logueado aparte del token.</text:p>
        </text:list-item>
        <text:list-item>
          <text:p text:style-name="P4">En caso de error en user o password, debe enviar mensaje para que lo visualice el usuario en el frontend.</text:p>
        </text:list-item>
      </text:list>
      <text:p text:style-name="P5"/>
      <text:p text:style-name="P6">Ruta obtener fotos.</text:p>
      <text:list text:style-name="L2">
        <text:list-item>
          <text:p text:style-name="P7">Falta implementar paginación.</text:p>
        </text:list-item>
      </text:list>
      <text:p text:style-name="P8"/>
      <text:p text:style-name="P9">Ruta new_foto.</text:p>
      <text:list text:style-name="L3">
        <text:list-item>
          <text:p text:style-name="P10">Debe enviar un mensaje al frontend diciendo si la foto se ha guardado o el motivo del error.</text:p>
        </text:list-item>
        <text:list-item>
          <text:p text:style-name="P11">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2">Todas las rutas.</text:p>
      <text:list text:style-name="L4">
        <text:list-item>
          <text:p text:style-name="P13">Actualizar la seguridad desarrollando el token recibido, para obtener el user.</text:p>
        </text:list-item>
      </text:list>
      <text:p text:style-name="P14">Implementación de fastapi-mailer.</text:p>
      <text:list text:style-name="L5">
        <text:list-item>
          <text:p text:style-name="P15">Se usará el campo disable ya existente para activar al nuevo usuario. <text:span text:style-name="T1">Además se deberá implementar la pérdida de contraseña.</text:span></text:p>
        </text:list-item>
      </text:list>
      <text:p text:style-name="P16"/>
      <text:p text:style-name="P17">Despliegue:</text:p>
      <text:list text:style-name="L6">
        <text:list-item>
          <text:p text:style-name="P18">Generar una nueva SECRET_KEY, ya que la actual ha sido expuesta como <text:span text:style-name="T2">repositorio</text:span> público de gitHub.</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08T19:33:50.862368707</dc:date>
    <meta:editing-duration>PT3H34M23S</meta:editing-duration>
    <meta:editing-cycles>9</meta:editing-cycles>
    <meta:generator>LibreOffice/26.2.3.2$Linux_X86_64 LibreOffice_project/d4d5ed47b6084125f28d269a5650105d54dde034</meta:generator>
    <meta:document-statistic meta:table-count="0" meta:image-count="0" meta:object-count="0" meta:page-count="1" meta:paragraph-count="16" meta:word-count="182" meta:character-count="1070" meta:non-whitespace-character-count="913"/>
  </office:meta>
</office:document-meta>
</file>