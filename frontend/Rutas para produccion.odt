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font-weight="bold" officeooo:rsid="00188278" officeooo:paragraph-rsid="00188278" style:font-size-asian="17.5pt" style:font-weight-asian="bold" style:font-size-complex="20pt" style:font-weight-complex="bold"/>
    </style:style>
    <style:style style:name="P2" style:family="paragraph" style:parent-style-name="Text_20_body">
      <style:text-properties fo:color="#c9211e" loext:opacity="100%" officeooo:rsid="0019788f" officeooo:paragraph-rsid="0019788f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style:font-name="Liberation Mono" fo:font-weight="bold"/>
    </style:style>
    <style:style style:name="T3" style:family="text">
      <style:text-properties style:font-name="Liberation Mono"/>
    </style:style>
    <style:style style:name="T4" style:family="text">
      <style:text-properties fo:font-style="italic"/>
    </style:style>
    <style:style style:name="T5" style:family="text">
      <style:text-properties style:font-name="Liberation Mono"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CONFIGURACIÓN DE RUTAS PARA PRODUCCIÓN</text:p>
      <text:p text:style-name="Text_20_body"/>
      <text:p text:style-name="P2">La solución correcta está a partir de la página 3. Cambia el uso y el nombre de los archivos.</text:p>
      <text:p text:style-name="Text_20_body"/>
      <text:p text:style-name="Text_20_body">En la solución anterior, me he decidido por la opción 1, el sistema de entornos de Angular v21. No tengo el directorio 'environments', ¿Como lo creo y como creo tambien environment.ts, he de hacerlo a mano desde el terminal o es preferible usar un comando?</text:p>
      <text:p text:style-name="Text_20_body"/>
      <text:p text:style-name="Text_20_body">Es completamente normal que no veas ese directorio. Desde Angular 15 (y manteniéndose en la v21), el equipo de Angular decidió <text:span text:style-name="T1">dejar de generar la carpeta </text:span><text:span text:style-name="T2">environments</text:span><text:span text:style-name="T1"> por defecto</text:span> al crear un proyecto nuevo (<text:span text:style-name="T3">ng new</text:span>), para mantener la estructura inicial más limpia y minimalista.</text:p>
      <text:p text:style-name="Text_20_body">Para tu caso, <text:span text:style-name="T1">NO lo hagas a mano desde el terminal o la IDE</text:span>. Es muchísimo preferible usar un comando específico del CLI de Angular.</text:p>
      <text:p text:style-name="Text_20_body">¿Por qué? Porque si lo haces a mano, no solo tendrías que crear los archivos, sino que además tendrías que editar manualmente el archivo <text:span text:style-name="T3">angular.json</text:span> para decirle a Angular qué archivo usar cuando compiles para producción. El comando del CLI hace todo eso por ti en un segundo.</text:p>
      <text:p text:style-name="Text_20_body">Aquí tienes los pasos exactos:</text:p>
      <text:h text:style-name="Heading_20_3" text:outline-level="3">Paso 1: Usar el comando del CLI</text:h>
      <text:p text:style-name="Text_20_body">Abre tu terminal en la raíz de tu proyecto Angular y ejecuta:</text:p>
      <text:p text:style-name="P3">ng generate environments</text:p>
      <text:p text:style-name="Text_20_body"><text:span text:style-name="T4">(O su versión corta: </text:span><text:span text:style-name="T5">ng g environments</text:span><text:span text:style-name="T4">)</text:span></text:p>
      <text:h text:style-name="Heading_20_3" text:outline-level="3">Paso 2: Qué acaba de hacer el comando</text:h>
      <text:p text:style-name="Text_20_body">Si miras tu explorador de archivos, verás que el comando ha hecho tres cosas automáticamente:</text:p>
      <text:list text:style-name="L1">
        <text:list-item>
          <text:p text:style-name="P4">Ha creado la carpeta <text:span text:style-name="T3">src/environments/</text:span>.</text:p>
        </text:list-item>
        <text:list-item>
          <text:p text:style-name="P4">Ha creado dos archivos dentro: <text:span text:style-name="T3">environment.ts</text:span> (para desarrollo) y <text:span text:style-name="T3">environment.prod.ts</text:span> (o <text:span text:style-name="T3">environment.production.ts</text:span>, dependiendo de la versión exacta del schematic, para producción).</text:p>
        </text:list-item>
        <text:list-item>
          <text:p text:style-name="P4"><text:span text:style-name="T1">Lo más importante:</text:span> Ha modificado tu archivo <text:span text:style-name="T3">angular.json</text:span> en la raíz del proyecto. Ha añadido una sección de <text:span text:style-name="T3">fileReplacements</text:span> que le dice a Angular: <text:span text:style-name="T4">"Cuando te pida compilar en producción, ignora el </text:span><text:span text:style-name="T5">environment.ts</text:span><text:span text:style-name="T4"> normal y usa el de producción en su lugar"</text:span>.</text:p>
        </text:list-item>
      </text:list>
      <text:h text:style-name="Heading_20_3" text:outline-level="3" text:is-list-header="true"><text:soft-page-break/>Paso 3: Rellenar tus variables</text:h>
      <text:p text:style-name="Text_20_body">Ahora abre los archivos que se acaban de crear y añade tu URL base.</text:p>
      <text:p text:style-name="Text_20_body"><text:span text:style-name="T1">Para desarrollo (</text:span><text:span text:style-name="T2">src/environments/environment.ts</text:span><text:span text:style-name="T1">):</text:span></text:p>
      <text:p text:style-name="P3">export const environment = {<text:line-break/> <text:s/>production: false,<text:line-break/> <text:s/>apiUrl: 'http://localhost:8000' // Tu FastAPI en local<text:line-break/>};</text:p>
      <text:p text:style-name="Text_20_body"><text:span text:style-name="T1">Para producción (</text:span><text:span text:style-name="T2">src/environments/environment.prod.ts</text:span><text:span text:style-name="T1"> o similar):</text:span></text:p>
      <text:p text:style-name="P3">export const environment = {<text:line-break/> <text:s/>production: true,<text:line-break/> <text:s/>apiUrl: 'https://api.tudominio.com' // La URL real de tu FastAPI desplegado<text:line-break/>};</text:p>
      <text:h text:style-name="Heading_20_3" text:outline-level="3">Paso 4: Usarlo en tu código</text:h>
      <text:p text:style-name="Text_20_body">Ahora ya puedes importarlo en tus servicios exactamente como te expliqué en la respuesta anterior:</text:p>
      <text:p text:style-name="P3">import { Injectable, inject } from '@angular/core';<text:line-break/>import { HttpClient } from '@angular/common/http';<text:line-break/>import { environment } from '../../environments/environment'; // Ajusta la ruta relativa<text:line-break/><text:line-break/>@Injectable({ providedIn: 'root' })<text:line-break/>export class MiServicio {<text:line-break/> <text:s/>private http = inject(HttpClient);<text:line-break/> <text:s/><text:line-break/> <text:s/>obtenerDatos() {<text:line-break/> <text:s text:c="3"/>// Esto usará localhost:8000 en desarrollo, y la URL de producción al compilar<text:line-break/> <text:s text:c="3"/>return this.http.get(`${environment.apiUrl}/api/usuarios`);<text:line-break/> <text:s/>}<text:line-break/>}</text:p>
      <text:h text:style-name="Heading_20_3" text:outline-level="3">Paso 5: Cómo compilar para que funcione el cambio</text:h>
      <text:p text:style-name="Text_20_body">Cuando estés desarrollando (<text:span text:style-name="T3">ng serve</text:span>), Angular usará automáticamente el <text:span text:style-name="T3">environment.ts</text:span> normal (localhost).</text:p>
      <text:p text:style-name="Text_20_body">Pero cuando vayas a desplegar tu app a producción, debes compilarla indicándole que use la configuración de producción. Lo haces así:</text:p>
      <text:p text:style-name="P3"># Compila la app usando los valores de environment.prod.ts<text:line-break/>ng build --configuration production</text:p>
      <text:p text:style-name="Text_20_body"><text:span text:style-name="T4">(Nota: En versiones muy antiguas se usaba </text:span><text:span text:style-name="T5">--prod</text:span><text:span text:style-name="T4">, pero en Angular v21 lo correcto es </text:span><text:span text:style-name="T5">--configuration production</text:span><text:span text:style-name="T4"> o simplemente </text:span><text:span text:style-name="T5">ng build</text:span><text:span text:style-name="T4"> si tu configuración por defecto en </text:span><text:span text:style-name="T5">angular.json</text:span><text:span text:style-name="T4"> ya apunta a production).</text:span></text:p>
      <text:h text:style-name="Heading_20_3" text:outline-level="3"><text:soft-page-break/>Resumen</text:h>
      <text:p text:style-name="Text_20_body">Usa siempre <text:span text:style-name="T2">ng g environments</text:span>. Te ahorra tener que configurar manualmente el <text:span text:style-name="T3">angular.json</text:span> y te garantiza que el sistema de reemplazo de archivos de Angular funcione a la perfección.</text:p>
      <text:p text:style-name="P5">Si la ruta en producción de mi servidor será "https://alfaros.asuscomm.com/", ¿como quedarían mis archivos de entorno, teniendo en cuenta que el archivo generado además de 'environment.ts' no es 'enviroment.production.ts' sino 'environment.development.ts'?</text:p>
      <text:p text:style-name="Text_20_body"/>
      <text:p text:style-name="Text_20_body">¡Excelente observación! Esto es un detalle <text:span text:style-name="T1">crítico</text:span> que suele confundir a muchos desarrolladores porque Angular cambió su comportamiento a partir de la versión 15 (y se mantiene en la v21).</text:p>
      <text:p text:style-name="Text_20_body">En las versiones antiguas de Angular, <text:span text:style-name="T3">environment.ts</text:span> era para desarrollo y <text:span text:style-name="T3">environment.prod.ts</text:span> para producción. <text:span text:style-name="T1">En el Angular moderno, la lógica es exactamente la inversa:</text:span></text:p>
      <text:list text:style-name="L2">
        <text:list-item>
          <text:p text:style-name="P6"><text:span text:style-name="T2">environment.ts</text:span>: Es el archivo <text:span text:style-name="T1">base/producción</text:span>. Se usa por defecto cuando compilas la app (<text:span text:style-name="T3">ng build</text:span>).</text:p>
        </text:list-item>
        <text:list-item>
          <text:p text:style-name="P6"><text:span text:style-name="T2">environment.development.ts</text:span>: Es el archivo de <text:span text:style-name="T1">desarrollo</text:span>. Angular lo usa <text:span text:style-name="T4">solo</text:span> cuando ejecutas <text:span text:style-name="T3">ng serve</text:span>, reemplazando temporalmente al archivo base.</text:p>
        </text:list-item>
      </text:list>
      <text:p text:style-name="Text_20_body">Por lo tanto, <text:span text:style-name="T1">no renombres los archivos</text:span>. Simplemente debes poner las URLs en el archivo contrario al que intuitionmente pensarías. Así es como deben quedar:</text:p>
      <text:h text:style-name="Heading_20_3" text:outline-level="3">1. Archivo para PRODUCCIÓN: <text:span text:style-name="T3">src/environments/environment.ts</text:span></text:h>
      <text:p text:style-name="Text_20_body">Este es el archivo que se usará cuando despliegues la app. Aquí va tu URL real de Asus.</text:p>
      <text:p text:style-name="P3">// src/environments/environment.ts<text:line-break/>export const environment = {<text:line-break/> <text:s/>production: true,<text:line-break/> <text:s/>// Sin la barra final para evitar problemas de concatenación (ej: dominio.com//api)<text:line-break/> <text:s/>apiUrl: 'https://alfaros.asuscomm.com' <text:line-break/>};</text:p>
      <text:h text:style-name="Heading_20_3" text:outline-level="3">2. Archivo para DESARROLLO: <text:span text:style-name="T3">src/environments/environment.development.ts</text:span></text:h>
      <text:p text:style-name="Text_20_body">Este es el archivo que se usará cuando estés programando en local con <text:span text:style-name="T3">ng serve</text:span>.</text:p>
      <text:p text:style-name="P3">// src/environments/environment.development.ts<text:line-break/>export const environment = {<text:line-break/> <text:s/>production: false,<text:line-break/> <text:s/>apiUrl: 'http://localhost:8000' // Tu FastAPI local<text:line-break/>};</text:p>
      <text:p text:style-name="Horizontal_20_Line"/>
      <text:h text:style-name="Heading_20_3" text:outline-level="3"><text:soft-page-break/>💡 Un consejo de oro sobre las barras finales (<text:span text:style-name="T3">/</text:span>)</text:h>
      <text:p text:style-name="Text_20_body">Fíjate que en <text:span text:style-name="T3">environment.ts</text:span> he puesto <text:span text:style-name="T3">'https://alfaros.asuscomm.com'</text:span> <text:span text:style-name="T1">sin la barra final</text:span>.</text:p>
      <text:p text:style-name="Text_20_body">Es una muy mala práctica poner la barra final en la variable de entorno (ej: <text:span text:style-name="T3">'https://alfaros.asuscomm.com/'</text:span>), porque cuando hagas la concatenación en tu servicio usando <text:span text:style-name="T4">template literals</text:span>, te arriesgas a crear rutas con doble barra si no tienes cuidado.</text:p>
      <text:p text:style-name="Text_20_body"><text:span text:style-name="T1">La forma correcta de usarlo en tu servicio Angular:</text:span></text:p>
      <text:p text:style-name="P3">import { Injectable, inject } from '@angular/core';<text:line-break/>import { HttpClient } from '@angular/common/http';<text:line-break/>import { environment } from '../../environments/environment';<text:line-break/><text:line-break/>@Injectable({ providedIn: 'root' })<text:line-break/>export class UsuarioService {<text:line-break/> <text:s/>private http = inject(HttpClient);<text:line-break/> <text:s/>private apiUrl = environment.apiUrl;<text:line-break/><text:line-break/> <text:s/>// Fíjate cómo la barra '/' va siempre en la concatenación, no en la variable<text:line-break/> <text:s/>obtenerUsuarios() {<text:line-break/> <text:s text:c="3"/>return this.http.get(`${this.apiUrl}/api/usuarios`);<text:line-break/> <text:s/>}<text:line-break/><text:line-break/> <text:s/>obtenerUsuarioPorId(id: number) {<text:line-break/> <text:s text:c="3"/>return this.http.get(`${this.apiUrl}/api/usuarios/${id}`);<text:line-break/> <text:s/>}<text:line-break/>}</text:p>
      <text:h text:style-name="Heading_20_3" text:outline-level="3">Resumen de cómo funcionará en tu día a día:</text:h>
      <text:list text:style-name="L3">
        <text:list-item>
          <text:p text:style-name="P7"><text:span text:style-name="T1">Mientras programas (</text:span><text:span text:style-name="T2">ng serve</text:span><text:span text:style-name="T1">)</text:span>: Angular leerá <text:span text:style-name="T3">environment.development.ts</text:span>. Tus peticiones irán a <text:span text:style-name="T3">http://localhost:8000/api/usuarios</text:span>.</text:p>
        </text:list-item>
        <text:list-item>
          <text:p text:style-name="P7"><text:span text:style-name="T1">Cuando despliegues (</text:span><text:span text:style-name="T2">ng build</text:span><text:span text:style-name="T1">)</text:span>: Angular leerá <text:span text:style-name="T3">environment.ts</text:span>. Tus peticiones irán a <text:span text:style-name="T3">https://alfaros.asuscomm.com/api/usuarios</text:span>.</text:p>
        </text:list-item>
      </text:list>
      <text:p text:style-name="Text_20_body">¡Y listo! Con esto tienes el enrutamiento dinámico perfectamente configurado para los dos entorno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4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08:28:46.191908707</meta:creation-date>
    <dc:date>2026-06-18T08:53:23.349991583</dc:date>
    <meta:editing-duration>PT11M4S</meta:editing-duration>
    <meta:editing-cycles>3</meta:editing-cycles>
    <meta:generator>LibreOffice/26.2.3.2$Linux_X86_64 LibreOffice_project/d4d5ed47b6084125f28d269a5650105d54dde034</meta:generator>
    <meta:document-statistic meta:table-count="0" meta:image-count="0" meta:object-count="0" meta:page-count="4" meta:paragraph-count="54" meta:word-count="981" meta:character-count="6790" meta:non-whitespace-character-count="5811"/>
  </office:meta>
</office:document-meta>
</file>