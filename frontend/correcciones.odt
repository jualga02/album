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37ea" officeooo:paragraph-rsid="000937e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left" style:justify-single-word="false"/>
      <style:text-properties fo:font-size="14pt" officeooo:rsid="000937ea" officeooo:paragraph-rsid="000937ea" style:font-size-asian="12.25pt" style:font-size-complex="14pt"/>
    </style:style>
    <style:style style:name="P3" style:family="paragraph" style:parent-style-name="Standard">
      <style:paragraph-properties fo:text-align="left" style:justify-single-word="false"/>
      <style:text-properties fo:font-size="14pt" fo:font-weight="normal" officeooo:rsid="000937ea" officeooo:paragraph-rsid="000937e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text-line-through-style="solid" style:text-line-through-type="single" fo:font-size="14pt" fo:font-weight="normal" officeooo:rsid="000937ea" officeooo:paragraph-rsid="000937ea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left" style:justify-single-word="false"/>
      <style:text-properties style:text-line-through-style="solid" style:text-line-through-type="single" fo:font-size="14pt" fo:font-weight="normal" officeooo:rsid="000e45c9" officeooo:paragraph-rsid="000e45c9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left" style:justify-single-word="false"/>
      <style:text-properties fo:font-size="14pt" fo:font-weight="normal" officeooo:rsid="000e45c9" officeooo:paragraph-rsid="000e45c9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left" style:justify-single-word="false"/>
      <style:text-properties style:text-line-through-style="solid" style:text-line-through-type="single" fo:font-size="14pt" fo:font-weight="normal" officeooo:rsid="000f4b83" officeooo:paragraph-rsid="000f4b83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left" style:justify-single-word="false"/>
      <style:text-properties style:text-line-through-style="solid" style:text-line-through-type="single" fo:font-size="14pt" fo:font-weight="normal" officeooo:rsid="00107d44" officeooo:paragraph-rsid="00107d44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left" style:justify-single-word="false"/>
      <style:text-properties style:text-line-through-style="solid" style:text-line-through-type="single" fo:font-size="14pt" fo:font-weight="normal" officeooo:rsid="001511e1" officeooo:paragraph-rsid="001511e1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left" style:justify-single-word="false"/>
      <style:text-properties fo:font-size="14pt" fo:font-weight="normal" officeooo:rsid="001384c4" officeooo:paragraph-rsid="001384c4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left" style:justify-single-word="false"/>
      <style:text-properties fo:font-size="14pt" fo:font-weight="normal" officeooo:rsid="0013f800" officeooo:paragraph-rsid="0013f80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left" style:justify-single-word="false"/>
      <style:text-properties fo:font-size="14pt" fo:font-weight="normal" officeooo:rsid="001384c4" officeooo:paragraph-rsid="001384c4" style:font-size-asian="12.25pt" style:font-weight-asian="normal" style:font-size-complex="14pt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b31c5"/>
    </style:style>
    <style:style style:name="T3" style:family="text">
      <style:text-properties officeooo:rsid="000f4b83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CIONES</text:p>
      <text:p text:style-name="P2"/>
      <text:p text:style-name="P2"/>
      <text:p text:style-name="P3">- <text:span text:style-name="T1">Tener en cuenta si las fotos pertenecen al user para mostrar o no edición y borrado.</text:span></text:p>
      <text:p text:style-name="P4">- <text:span text:style-name="T2">El menú principal del header debe tener “position: static” en lugar de</text:span></text:p>
      <text:p text:style-name="P4">“<text:span text:style-name="T2">position: fixed” y sin cambio de fondo (Seguramente implementado en bootstrap).</text:span></text:p>
      <text:list text:style-name="L1">
        <text:list-item>
          <text:p text:style-name="P5">La ventana de login debe informar al usuario de los errores en el logueo, así como, el user <text:span text:style-name="T3">que</text:span> debe ser el email y no el nombre de usuario.</text:p>
        </text:list-item>
        <text:list-item>
          <text:p text:style-name="P5">Falta la ventana de join.</text:p>
        </text:list-item>
        <text:list-item>
          <text:p text:style-name="P6"><text:span text:style-name="T1">Falta la validación por email: fastapi-mailer,</text:span> <text:span text:style-name="T1">así como la recuperación de contraseña.</text:span></text:p>
        </text:list-item>
        <text:list-item>
          <text:p text:style-name="P5">Faltan los menús <text:span text:style-name="T4">editar </text:span>y borrar foto.</text:p>
        </text:list-item>
        <text:list-item>
          <text:p text:style-name="P7">Añadir al menú editar el nombre de archivo que se está editando.</text:p>
        </text:list-item>
        <text:list-item>
          <text:p text:style-name="P8">Añadir al menú borrar el nombre de archivo que se borrará.</text:p>
        </text:list-item>
        <text:list-item>
          <text:p text:style-name="P5">Falta el texto indicador de la búsqueda realizada en album.</text:p>
        </text:list-item>
        <text:list-item>
          <text:p text:style-name="P5">Falta el reproductor de vídeo.</text:p>
        </text:list-item>
        <text:list-item>
          <text:p text:style-name="P9">Añadir a la view updateprofile un botón para ver el perfil y desactivar el botón modificar perfil hasta que se haya hecho una modificaión en algún campo.</text:p>
        </text:list-item>
        <text:list-item>
          <text:p text:style-name="P10">Limpiar código:</text:p>
          <text:list>
            <text:list-item>
              <text:list>
                <text:list-item>
                  <text:list>
                    <text:list-item>
                      <text:p text:style-name="P10">Código comentado no utilizable.</text:p>
                    </text:list-item>
                    <text:list-item>
                      <text:p text:style-name="P10">Funciones que no se usarán. No olvidar ‘albumcalls.ts’</text:p>
                    </text:list-item>
                    <text:list-item>
                      <text:p text:style-name="P10">Etc.</text:p>
                    </text:list-item>
                    <text:list-item>
                      <text:p text:style-name="P11">Intentar eliminar el tipo any en las funciones de ‘albumcalls.ts’, sutituyéndolas por interfaces de la carpeta models.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09:26:32.106831620</meta:creation-date>
    <dc:date>2026-06-17T20:42:56.898533358</dc:date>
    <meta:editing-duration>PT2H42M</meta:editing-duration>
    <meta:editing-cycles>11</meta:editing-cycles>
    <meta:generator>LibreOffice/26.2.3.2$Linux_X86_64 LibreOffice_project/d4d5ed47b6084125f28d269a5650105d54dde034</meta:generator>
    <meta:document-statistic meta:table-count="0" meta:image-count="0" meta:object-count="0" meta:page-count="1" meta:paragraph-count="19" meta:word-count="206" meta:character-count="1141" meta:non-whitespace-character-count="965"/>
  </office:meta>
</office:document-meta>
</file>